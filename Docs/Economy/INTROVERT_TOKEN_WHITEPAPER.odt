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left="0cm" fo:margin-right="0cm" fo:margin-top="0cm" fo:margin-bottom="0.247cm" style:contextual-spacing="false" fo:line-height="114%" fo:text-indent="0cm" style:auto-text-indent="false"/>
      <style:text-properties style:font-name="Trebuchet MS" fo:font-size="10pt" style:font-size-asian="10pt" style:font-size-complex="10pt"/>
    </style:style>
    <style:style style:name="P2" style:family="paragraph" style:parent-style-name="Text_20_body">
      <style:paragraph-properties fo:margin-left="0cm" fo:margin-right="0cm" fo:margin-top="0cm" fo:margin-bottom="0.247cm" style:contextual-spacing="false" fo:line-height="114%" fo:text-indent="0cm" style:auto-text-indent="false"/>
      <style:text-properties style:font-name="Trebuchet MS" fo:font-size="10pt" fo:font-weight="bold" style:font-size-asian="10pt" style:font-size-complex="10pt"/>
    </style:style>
    <style:style style:name="P3" style:family="paragraph" style:parent-style-name="Heading_20_2">
      <style:paragraph-properties fo:margin-left="0cm" fo:margin-right="0cm" fo:margin-top="0cm" fo:margin-bottom="0.247cm" style:contextual-spacing="false" fo:line-height="114%" fo:text-indent="0cm" style:auto-text-indent="false"/>
      <style:text-properties style:font-name="Trebuchet MS" fo:font-size="10pt" style:font-size-asian="10pt" style:font-size-complex="10pt"/>
    </style:style>
    <style:style style:name="P4" style:family="paragraph" style:parent-style-name="Text_20_body">
      <style:paragraph-properties fo:margin-left="0cm" fo:margin-right="0cm" fo:margin-top="0cm" fo:margin-bottom="0.247cm" style:contextual-spacing="false" fo:line-height="114%" fo:text-indent="0cm" style:auto-text-indent="false"/>
      <style:text-properties style:font-name="Trebuchet MS" fo:font-size="10pt" style:font-size-asian="10pt" style:font-size-complex="10pt"/>
    </style:style>
    <style:style style:name="P5"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Trebuchet MS" fo:font-size="10pt" style:font-size-asian="10pt" style:font-size-complex="10pt"/>
    </style:style>
    <style:style style:name="P6"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style>
    <style:style style:name="P7" style:family="paragraph" style:parent-style-name="Preformatted_20_Text">
      <style:paragraph-properties fo:margin-left="0cm" fo:margin-right="0cm" fo:margin-top="0cm" fo:margin-bottom="0cm" style:contextual-spacing="false" fo:line-height="114%" fo:text-indent="0cm" style:auto-text-indent="false"/>
    </style:style>
    <style:style style:name="P8" style:family="paragraph" style:parent-style-name="Preformatted_20_Text">
      <style:paragraph-properties fo:margin-top="0cm" fo:margin-bottom="0cm" style:contextual-spacing="false" fo:line-height="114%"/>
    </style:style>
    <style:style style:name="P9" style:family="paragraph" style:parent-style-name="Heading_20_3">
      <style:paragraph-properties fo:margin-left="0cm" fo:margin-right="0cm" fo:margin-top="0cm" fo:margin-bottom="0.247cm" style:contextual-spacing="false" fo:line-height="114%" fo:text-indent="0cm" style:auto-text-indent="false"/>
      <style:text-properties style:font-name="Trebuchet MS" fo:font-size="10pt" style:font-size-asian="10pt" style:font-size-complex="10pt"/>
    </style:style>
    <style:style style:name="P10"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Trebuchet MS" fo:font-size="10pt" style:font-size-asian="10pt" style:font-size-complex="10pt"/>
    </style:style>
    <style:style style:name="P11"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Trebuchet MS" fo:font-size="10pt" style:font-size-asian="10pt" style:font-size-complex="10pt"/>
    </style:style>
    <style:style style:name="P12"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Trebuchet MS" fo:font-size="10pt" style:font-size-asian="10pt" style:font-size-complex="10pt"/>
    </style:style>
    <style:style style:name="P13"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Trebuchet MS" fo:font-size="10pt" style:font-size-asian="10pt" style:font-size-complex="10pt"/>
    </style:style>
    <style:style style:name="P14"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Trebuchet MS" fo:font-size="10pt" style:font-size-asian="10pt" style:font-size-complex="10pt"/>
    </style:style>
    <style:style style:name="P15" style:family="paragraph" style:parent-style-name="Standard">
      <style:text-properties style:font-name="Trebuchet MS" fo:font-size="10pt" style:font-size-asian="10pt" style:font-size-complex="10pt"/>
    </style:style>
    <style:style style:name="T1" style:family="text">
      <style:text-properties fo:font-weight="bold"/>
    </style:style>
    <style:style style:name="T2" style:family="text">
      <style:text-properties style:font-name="Trebuchet MS" fo:font-size="10pt" fo:font-weight="bold" style:font-size-asian="10pt" style:font-size-complex="10pt"/>
    </style:style>
    <style:style style:name="T3" style:family="text">
      <style:text-properties style:font-name="Trebuchet MS" fo:font-size="10pt" style:font-size-asian="10pt" style:font-size-complex="10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vert ($INTR) Token Economic Blueprint &amp; White Paper</text:h>
      <text:p text:style-name="P2">A Sovereign, Highly Profitable P2P Mesh Network Economy</text:p>
      <text:h text:style-name="P3" text:outline-level="2">1. Executive Summary &amp; Philosophy</text:h>
      <text:p text:style-name="P4"><text:bookmark text:name="p-rc_177e85d50fe6707e-1218"/>Project Introvert is a privacy-first, fully decentralized communication platform that completely eliminates central servers. Operating via a crowdsourced, self-healing Peer-to-Peer (P2P) mesh network, it ensures zero-knowledge, autonomous, and censorship-resistant utility for global users. </text:p>
      <text:p text:style-name="P4"><text:bookmark text:name="p-rc_177e85d50fe6707e-1219"/>The native <text:span text:style-name="T1">$INTR</text:span> token acts as the economic lifeblood of this decentralized infrastructure. It aligns incentives between daily users contributing communication activity and node operators providing network availability. Because the network cannot exist without active, dedicated infrastructure, the economic model is intentionally engineered to make running Root Bootstrap Nodes (RBNs) and Edge Nodes highly profitable, ensuring a robust backbone for over 1,000,000 active users. </text:p>
      <text:p text:style-name="P4"><text:bookmark text:name="p-rc_177e85d50fe6707e-1220"/>By utilizing an autonomous Program-Derived Address (PDA) escrow vault on the Solana blockchain and governance via a Squads V4 multisig, the ecosystem is insulated from developer dependency, corporate censorship, or custodial risks. </text:p>
      <text:h text:style-name="P3" text:outline-level="2">2. Core Token Specifications</text:h>
      <text:p text:style-name="P4"><text:bookmark text:name="p-rc_177e85d50fe6707e-1221"/>The token operates as an immutable asset deployed on the Solana blockchain to support low-latency, gasless micro-incentives with minimal overhead. </text:p>
      <text:list text:style-name="L1">
        <text:list-item>
          <text:p text:style-name="P5"><text:bookmark text:name="p-rc_177e85d50fe6707e-1222"/><text:span text:style-name="T1">Token Name:</text:span> Introvert Token </text:p>
        </text:list-item>
        <text:list-item>
          <text:p text:style-name="P5"><text:bookmark text:name="p-rc_177e85d50fe6707e-1223"/><text:span text:style-name="T1">Token Symbol:</text:span> $INTR </text:p>
        </text:list-item>
        <text:list-item>
          <text:p text:style-name="P5"><text:bookmark text:name="p-rc_177e85d50fe6707e-1224"/><text:span text:style-name="T1">Total Supply:</text:span> 100,000,000 (Fixed / Non-inflationary) </text:p>
        </text:list-item>
        <text:list-item>
          <text:p text:style-name="P5"><text:bookmark text:name="p-rc_177e85d50fe6707e-1225"/><text:span text:style-name="T1">Decimals:</text:span> 9 (Standard SPL precision) </text:p>
        </text:list-item>
        <text:list-item>
          <text:p text:style-name="P6"><text:span text:style-name="T2">Solana Mint Address:</text:span><text:span text:style-name="T3"> </text:span><text:span text:style-name="Source_20_Text"><text:span text:style-name="T3">NCdrqtdCzUBkmNFHEBKLqkcppGj7GW8gfCSEhoWoSMn</text:span></text:span></text:p>
        </text:list-item>
        <text:list-item>
          <text:p text:style-name="P5"><text:bookmark text:name="p-rc_177e85d50fe6707e-1226"/><text:bookmark text:name="p-rc_177e85d50fe6707e-1227"/><text:span text:style-name="T1">Mint Authority Status:</text:span> Disabled (Permanently Revoked) </text:p>
        </text:list-item>
        <text:list-item>
          <text:p text:style-name="P5"><text:bookmark text:name="p-rc_177e85d50fe6707e-1228"/><text:span text:style-name="T1">Freeze Authority Status:</text:span> None (Censorship Resistant) </text:p>
        </text:list-item>
        <text:list-item>
          <text:p text:style-name="P5"><text:bookmark text:name="p-rc_177e85d50fe6707e-1229"/><text:span text:style-name="T1">Unified Governance Escrow Account (PDA):</text:span> Mathematically derived via program seeds </text:p>
        </text:list-item>
        <text:list-item>
          <text:p text:style-name="P5"><text:bookmark text:name="p-rc_177e85d50fe6707e-1230"/><text:span text:style-name="T1">Primary Emergency Core Multisig:</text:span> Squads V4 (3-of-5 Administration) </text:p>
        </text:list-item>
      </text:list>
      <text:h text:style-name="P3" text:outline-level="2">3. Responsible &amp; Fair Token Allocation Matrix</text:h>
      <text:p text:style-name="P4">To guarantee long-term network stability, reward core contributors, incentivize infrastructure deployment heavily, and allow immediate recovery of out-of-pocket development expenditures, the fixed 100,000,000 supply is partitioned into transparent tranches.</text:p>
      <text:p text:style-name="P7"><text:span text:style-name="Source_20_Text"><text:span text:style-name="T3">[ 50% Reward Pool / Treasury ] -----------&gt; Distributed via Daily Activity &amp; Node Emissions over 10 Years</text:span></text:span></text:p>
      <text:p text:style-name="P8"><text:span text:style-name="Source_20_Text"><text:span text:style-name="T3">[ 20% Growth &amp; Grants <text:s text:c="7"/>] -----------&gt; Strategic Ecosystem Grants, Frameworks, &amp; Partnerships</text:span></text:span></text:p>
      <text:p text:style-name="P8"><text:span text:style-name="Source_20_Text"><text:span text:style-name="T3">[ 10% Launch Reimbursement <text:s text:c="2"/>] -----------&gt; 100% Unlocked at Launch to offset developer costs</text:span></text:span></text:p>
      <text:p text:style-name="P8"><text:span text:style-name="Source_20_Text"><text:span text:style-name="T3">[ <text:s/>5% Core Team Vesting <text:s text:c="5"/>] -----------&gt; 12-Month Cliff followed by 24-Month Linear Vesting</text:span></text:span></text:p>
      <text:p text:style-name="P8"><text:span text:style-name="Source_20_Text"><text:span text:style-name="T3">[ 15% Initial Liquidity <text:s text:c="5"/>] -----------&gt; Public Distribution &amp; Automated Market Maker (AMM) Pools</text:span></text:span></text:p>
      <text:h text:style-name="P9" text:outline-level="3">Allocation Breakdown</text:h>
      <text:list text:style-name="L2">
        <text:list-item>
          <text:p text:style-name="P10"><text:bookmark text:name="p-rc_177e85d50fe6707e-1231"/><text:span text:style-name="T1">50% (50,000,000 $INTR) - Ecosystem Rewards Pool &amp; Treasury:</text:span> Maintained inside the keyless PDA Escrow Vault. These funds are dedicated strictly to user daily rewards, Root Bootstrap Node (RBN) incentives, and infrastructure bootstrapping over a 10-year macro-emission horizon. </text:p>
        </text:list-item>
        <text:list-item>
          <text:p text:style-name="P10"><text:bookmark text:name="p-rc_177e85d50fe6707e-1232"/><text:span text:style-name="T1">20% (20,000,000 $INTR) - Community Growth &amp; Open-Source Grants:</text:span> Allocated for strategic partnerships, regional RBN community growth, legal compliance frameworks, third-party plugin developer bounties, and security audits. </text:p>
        </text:list-item>
        <text:list-item>
          <text:p text:style-name="P10"><text:bookmark text:name="p-rc_177e85d50fe6707e-1233"/><text:soft-page-break/><text:span text:style-name="T1">10% (10,000,000 $INTR) - Developer Launch Reimbursement:</text:span> This tranche is 100% unlocked and liquid at the Token Generation Event (TGE). It is explicitly designated to allow the developer to immediately encash or pair tokens at launch to recoup out-of-pocket development costs incurred during the engineering of the Flutter UI and Rust engine. </text:p>
        </text:list-item>
        <text:list-item>
          <text:p text:style-name="P10"><text:span text:style-name="T1">5% (5,000,000 $INTR) - Core Developer &amp; Team Long-Term Incentives:</text:span> Retained to fuel ongoing platform maintenance, architectural R&amp;D, and engineering support. This allocation is locked under an on-chain smart contract with a strict <text:span text:style-name="T1">12-month cliff</text:span> followed by a <text:span text:style-name="T1">24-month linear vesting</text:span> schedule to guarantee long-term alignment with the network.</text:p>
        </text:list-item>
        <text:list-item>
          <text:p text:style-name="P10"><text:bookmark text:name="p-rc_177e85d50fe6707e-1234"/><text:span text:style-name="T1">15% (15,000,000 $INTR) - Public Initial Distribution &amp; Liquidity Support:</text:span> Dedicated to seeding automated market makers (AMMs) and liquidity pools (such as Raydium or Orca) to enable open, stable community participation. </text:p>
        </text:list-item>
      </text:list>
      <text:h text:style-name="P3" text:outline-level="2">4. The 10-Year Macro-Emission Schedule</text:h>
      <text:p text:style-name="P4"><text:bookmark text:name="p-rc_177e85d50fe6707e-1235"/>The <text:span text:style-name="T1">50% Ecosystem Rewards Pool (50,000,000 $INTR)</text:span> is mathematically released over a decade via a decaying distribution curve. This provides aggressive early bootstrapping rewards to maximize profitability for early adopters, naturally tapering as the network reaches mature global utility. </text:p>
      <text:p text:style-name="P7"><text:span text:style-name="Source_20_Text"><text:span text:style-name="T3">+------+-----------------------+--------------------------+-------------------------------+</text:span></text:span></text:p>
      <text:p text:style-name="P8"><text:span text:style-name="Source_20_Text"><text:span text:style-name="T3">| Year | Annual Pool Release <text:s text:c="2"/>| Daily User Reward Cap <text:s text:c="3"/>| RBN Annual Pool Allocation <text:s text:c="3"/>|</text:span></text:span></text:p>
      <text:p text:style-name="P8"><text:span text:style-name="Source_20_Text"><text:span text:style-name="T3">+------+-----------------------+--------------------------+-------------------------------+</text:span></text:span></text:p>
      <text:p text:style-name="P8"><text:span text:style-name="Source_20_Text"><text:span text:style-name="T3">| <text:s/>1 <text:s text:c="2"/>| 9,000,000 $INTR <text:s text:c="6"/>| 16,438 $INTR / day <text:s text:c="6"/>| 3,000,000 $INTR <text:s text:c="14"/>|</text:span></text:span></text:p>
      <text:p text:style-name="P8"><text:span text:style-name="Source_20_Text"><text:span text:style-name="T3">| <text:s/>2 <text:s text:c="2"/>| 7,200,000 $INTR <text:s text:c="6"/>| 13,150 $INTR / day <text:s text:c="6"/>| 2,400,000 $INTR <text:s text:c="14"/>|</text:span></text:span></text:p>
      <text:p text:style-name="P8"><text:span text:style-name="Source_20_Text"><text:span text:style-name="T3">| <text:s/>3 <text:s text:c="2"/>| 5,760,000 $INTR <text:s text:c="6"/>| 10,520 $INTR / day <text:s text:c="6"/>| 1,920,000 $INTR <text:s text:c="14"/>|</text:span></text:span></text:p>
      <text:p text:style-name="P8"><text:span text:style-name="Source_20_Text"><text:span text:style-name="T3">| <text:s/>4 <text:s text:c="2"/>| 4,608,000 $INTR <text:s text:c="6"/>| <text:s/>8,416 $INTR / day <text:s text:c="6"/>| 1,536,000 $INTR <text:s text:c="14"/>|</text:span></text:span></text:p>
      <text:p text:style-name="P8"><text:span text:style-name="Source_20_Text"><text:span text:style-name="T3">| <text:s/>5 <text:s text:c="2"/>| 3,686,400 $INTR <text:s text:c="6"/>| <text:s/>6,733 $INTR / day <text:s text:c="6"/>| 1,228,800 $INTR <text:s text:c="14"/>|</text:span></text:span></text:p>
      <text:p text:style-name="P8"><text:span text:style-name="Source_20_Text"><text:span text:style-name="T3">| <text:s/>6 <text:s text:c="2"/>| 2,949,120 $INTR <text:s text:c="6"/>| <text:s/>5,386 $INTR / day <text:s text:c="6"/>| <text:s text:c="2"/>983,040 $INTR <text:s text:c="14"/>|</text:span></text:span></text:p>
      <text:p text:style-name="P8"><text:span text:style-name="Source_20_Text"><text:span text:style-name="T3">| <text:s/>7 <text:s text:c="2"/>| 2,359,296 $INTR <text:s text:c="6"/>| <text:s/>4,309 $INTR / day <text:s text:c="6"/>| <text:s text:c="2"/>786,432 $INTR <text:s text:c="14"/>|</text:span></text:span></text:p>
      <text:p text:style-name="P8"><text:span text:style-name="Source_20_Text"><text:span text:style-name="T3">| <text:s/>8 <text:s text:c="2"/>| 1,887,437 $INTR <text:s text:c="6"/>| <text:s/>3,447 $INTR / day <text:s text:c="6"/>| <text:s text:c="2"/>629,145 $INTR <text:s text:c="14"/>|</text:span></text:span></text:p>
      <text:p text:style-name="P8"><text:span text:style-name="Source_20_Text"><text:span text:style-name="T3">| <text:s/>9 <text:s text:c="2"/>| 1,509,949 $INTR <text:s text:c="6"/>| <text:s/>2,757 $INTR / day <text:s text:c="6"/>| <text:s text:c="2"/>503,316 $INTR <text:s text:c="14"/>|</text:span></text:span></text:p>
      <text:p text:style-name="P8"><text:span text:style-name="Source_20_Text"><text:span text:style-name="T3">| <text:s/>10 <text:s/>| 1,207,960 $INTR <text:s text:c="6"/>| <text:s/>2,206 $INTR / day <text:s text:c="6"/>| <text:s text:c="2"/>402,653 $INTR <text:s text:c="14"/>|</text:span></text:span></text:p>
      <text:p text:style-name="P8"><text:span text:style-name="Source_20_Text"><text:span text:style-name="T3">+------+-----------------------+--------------------------+-------------------------------+</text:span></text:span></text:p>
      <text:p text:style-name="P8"><text:span text:style-name="Source_20_Text"><text:span text:style-name="T3">| Total| 40,168,162 $INTR* <text:s text:c="4"/>| *Remaining ~9.83M sits in Reserve Treasury for years 11+. <text:s text:c="3"/>|</text:span></text:span></text:p>
      <text:p text:style-name="P8"><text:span text:style-name="Source_20_Text"><text:span text:style-name="T3">+------+-----------------------+--------------------------+-------------------------------+</text:span></text:span></text:p>
      <text:h text:style-name="P3" text:outline-level="2">5. Daily Participation Reward System &amp; Node Status</text:h>
      <text:h text:style-name="P9" text:outline-level="3">A. Dynamic User Distribution Mechanics</text:h>
      <text:p text:style-name="P4"><text:bookmark text:name="p-rc_177e85d50fe6707e-1236"/>To sustain a network scaling toward <text:span text:style-name="T1">2 to 3 million active users</text:span>, the platform rejects static token conversion rates in favor of a dynamic, pool-clearing system. Every genuine communication action is tracked inside local SQLCipher storage and translated into points. At the end of each daily cycle (UTC 00:00 — 23:59), rewards are calculated algorithmically based on user activity relative to global usage, providing substantial payouts to network pillars: </text:p>
      <text:p text:style-name="P4">$$\text{User Daily Reward} = \left( \frac{\text{User Daily Points Earned}}{\text{Global Points Earned Across Network}} \right) \times \text{Daily Pool Cap}$$</text:p>
      <text:h text:style-name="P9" text:outline-level="3">B. What Counts as Genuine Activity</text:h>
      <text:list text:style-name="L3">
        <text:list-item>
          <text:p text:style-name="P11"><text:bookmark text:name="p-rc_177e85d50fe6707e-1237"/><text:span text:style-name="T1">Message Sent:</text:span> 10 points (Core engagement; minimum 5 characters to pass anti-spam). </text:p>
        </text:list-item>
        <text:list-item>
          <text:p text:style-name="P11"><text:bookmark text:name="p-rc_177e85d50fe6707e-1238"/><text:span text:style-name="T1">Message Received:</text:span> 5 points (Being part of active, ongoing conversations). </text:p>
        </text:list-item>
        <text:list-item>
          <text:p text:style-name="P11"><text:bookmark text:name="p-rc_177e85d50fe6707e-1239"/><text:span text:style-name="T1">Group Message Sent:</text:span> 8 points (Active community participation). </text:p>
        </text:list-item>
        <text:list-item>
          <text:p text:style-name="P11"><text:bookmark text:name="p-rc_177e85d50fe6707e-1240"/><text:span text:style-name="T1">Group Reaction:</text:span> 3 points (Light but meaningful interaction). </text:p>
        </text:list-item>
        <text:list-item>
          <text:p text:style-name="P11"><text:bookmark text:name="p-rc_177e85d50fe6707e-1241"/><text:span text:style-name="T1">File Transfer Sent / Received:</text:span> 20 points sent / 10 points received (High-value mesh data movement). </text:p>
        </text:list-item>
        <text:list-item>
          <text:p text:style-name="P11"><text:bookmark text:name="p-rc_177e85d50fe6707e-1242"/><text:soft-page-break/><text:span text:style-name="T1">Voice/Video Call:</text:span> 1 point per second (Real-time data stream communication; capped at 1 hour daily). </text:p>
        </text:list-item>
        <text:list-item>
          <text:p text:style-name="P11"><text:bookmark text:name="p-rc_177e85d50fe6707e-1243"/><text:span text:style-name="T1">Relay Bytes (For Others):</text:span> 0.01 points per KB (Direct infrastructure contribution). </text:p>
        </text:list-item>
        <text:list-item>
          <text:p text:style-name="P11"><text:bookmark text:name="p-rc_177e85d50fe6707e-1244"/><text:span text:style-name="T1">Node Uptime:</text:span> 0.001 points per second (Network availability; lowest baseline weight). </text:p>
        </text:list-item>
      </text:list>
      <text:h text:style-name="P9" text:outline-level="3">C. Anti-Gaming Guardrails</text:h>
      <text:p text:style-name="P4"><text:bookmark text:name="p-rc_177e85d50fe6707e-1245"/>To protect the integrity of the emission pool against virtual bot farms, the Rust core enforces strict automated filters: </text:p>
      <text:list text:style-name="L4">
        <text:list-item>
          <text:p text:style-name="P12"><text:bookmark text:name="p-rc_177e85d50fe6707e-1246"/><text:span text:style-name="T1">On-Chain Snapshot:</text:span> The user's wallet balance is snapshotted at UTC 00:00 to prevent mid-cycle balance manipulation tricks. </text:p>
        </text:list-item>
        <text:list-item>
          <text:p text:style-name="P12"><text:bookmark text:name="p-rc_177e85d50fe6707e-1247"/><text:span text:style-name="T1">Isolation Protection:</text:span> Users must interact with at least <text:span text:style-name="T1">3 unique peers</text:span> per cycle; self-sending or rapid-fire "solo usage" is entirely rejected. </text:p>
        </text:list-item>
        <text:list-item>
          <text:p text:style-name="P12"><text:bookmark text:name="p-rc_177e85d50fe6707e-1248"/><text:span text:style-name="T1">Rate &amp; Peer Caps:</text:span> Max 10 events per type per 60-second window, and a maximum of 50 messages to the exact same peer per day. </text:p>
        </text:list-item>
        <text:list-item>
          <text:p text:style-name="P12"><text:bookmark text:name="p-rc_177e85d50fe6707e-1249"/><text:span text:style-name="T1">Foreground Enforcement:</text:span> The mobile app must be active or running legitimately beyond a 30-second grace period; passive background idling alone yields insufficient points to qualify. </text:p>
        </text:list-item>
      </text:list>
      <text:h text:style-name="P9" text:outline-level="3">D. Activation Threshold for Node Status</text:h>
      <text:p text:style-name="P4"><text:bookmark text:name="p-rc_177e85d50fe6707e-1250"/>To qualify for background edge-routing features and active P2P data rewards, standard mobile clients must maintain a minimum baseline balance of <text:span text:style-name="T1">500 $INTR</text:span> within their local wallet. This creates structural Sybil resistance across the mesh layer while immediately qualifying participating nodes for a slice of daily emissions. </text:p>
      <text:h text:style-name="P3" text:outline-level="2">6. Root Bootstrap Node (RBN) Staking Infrastructure</text:h>
      <text:p text:style-name="P4"><text:bookmark text:name="p-rc_177e85d50fe6707e-1251"/>Root Bootstrap Nodes (RBNs) act as the backbone of the decentralized directory, coordinating discovery and dynamic multiaddress mapping. Because the network's existence depends on them, running an RBN is structured to be highly lucrative. </text:p>
      <text:list text:style-name="L5">
        <text:list-item>
          <text:p text:style-name="P13"><text:bookmark text:name="p-rc_177e85d50fe6707e-1252"/><text:span text:style-name="T1">The Baseline Bond:</text:span> Operators must transfer and lock exactly <text:span text:style-name="T1">50,000 $INTR</text:span> into the shared, keyless PDA Escrow Vault to register their multiaddress on the active network directory. </text:p>
        </text:list-item>
        <text:list-item>
          <text:p text:style-name="P13"><text:bookmark text:name="p-rc_177e85d50fe6707e-1253"/><text:span text:style-name="T1">Highly Profitable RBN Emissions:</text:span> RBN operators tap directly into a dedicated allocation from the annual rewards pool, earning ongoing distribution yield from the <text:span text:style-name="T1">3,000,000 $INTR allocation</text:span> in Year 1 for providing zero-knowledge storage and message relaying services. </text:p>
        </text:list-item>
        <text:list-item>
          <text:p text:style-name="P13"><text:bookmark text:name="p-rc_177e85d50fe6707e-1254"/><text:span text:style-name="T1">Work-Based Payouts:</text:span> Operators accumulate high-yield points via the Daily Reward System for critical infrastructure work, generating <text:span text:style-name="T1">0.01 points per KB</text:span> of data relayed and <text:span text:style-name="T1">0.001 points per second</text:span> of continuous node uptime. These points clear out daily from the treasury pool into a pending pool for direct claim via the Solana treasury relay flow. </text:p>
        </text:list-item>
        <text:list-item>
          <text:p text:style-name="P13"><text:bookmark text:name="p-rc_177e85d50fe6707e-1255"/><text:span text:style-name="T1">7-Day Unbonding Cooldown:</text:span> If an RBN operator withdraws from the network, their stake enters an unalterable <text:span text:style-name="T1">7-day on-chain cooldown state</text:span>. This protects network stability, preventing exit-scams if nodes drop offline or serve faulty data blocks. </text:p>
        </text:list-item>
      </text:list>
      <text:h text:style-name="P3" text:outline-level="2">7. The 4-Tier On-Chain Token Ownership Matrix</text:h>
      <text:p text:style-name="P4"><text:bookmark text:name="p-rc_177e85d50fe6707e-1256"/>To incentivize long-term token retention, reduce circulating supply velocity, and drive massive demand for the token, the local wallet balance is interlaced with the UI presentation layer. The Rust engine checks balances in real time to unlock high-visibility visual upgrades and premium network privileges. </text:p>
      <text:p text:style-name="P7"><text:span text:style-name="Source_20_Text"><text:span text:style-name="T3">+------------+------------------+-----------------------+---------------------------------+</text:span></text:span></text:p>
      <text:p text:style-name="P8"><text:span text:style-name="Source_20_Text"><text:span text:style-name="T3">| Status Tier| Balance Required | Profile Picture Asset | Network Privilege Unlocked <text:s text:c="5"/>|</text:span></text:span></text:p>
      <text:p text:style-name="P8"><text:span text:style-name="Source_20_Text"><text:span text:style-name="T3">+------------+------------------+-----------------------+---------------------------------+</text:span></text:span></text:p>
      <text:p text:style-name="P8"><text:span text:style-name="Source_20_Text"><text:span text:style-name="T3">| Regular <text:s text:c="3"/>| 500 $INTR <text:s text:c="7"/>| Standard dimensions <text:s text:c="2"/>| Unlocks Edge Relay Node status; |</text:span></text:span></text:p>
      <text:p text:style-name="P8"><text:span text:style-name="Source_20_Text"><text:span text:style-name="T3">| <text:s text:c="11"/>| <text:s text:c="17"/>| with Introvert Circle | qualifies for standard rewards <text:s/>|</text:span></text:span></text:p>
      <text:p text:style-name="P8"><text:soft-page-break/><text:span text:style-name="Source_20_Text"><text:span text:style-name="T3">+------------+------------------+-----------------------+---------------------------------+</text:span></text:span></text:p>
      <text:p text:style-name="P8"><text:span text:style-name="Source_20_Text"><text:span text:style-name="T3">| Silver <text:s text:c="4"/>| 10,000 $INTR <text:s text:c="4"/>| 130% enlargement; <text:s text:c="4"/>| Bypass background rate limits; <text:s/>|</text:span></text:span></text:p>
      <text:p text:style-name="P8"><text:span text:style-name="Source_20_Text"><text:span text:style-name="T3">| <text:s text:c="11"/>| <text:s text:c="17"/>| Metallic Thick Ring <text:s text:c="2"/>| priority data routing on RBNs <text:s text:c="2"/>|</text:span></text:span></text:p>
      <text:p text:style-name="P8"><text:span text:style-name="Source_20_Text"><text:span text:style-name="T3">+------------+------------------+-----------------------+---------------------------------+</text:span></text:span></text:p>
      <text:p text:style-name="P8"><text:span text:style-name="Source_20_Text"><text:span text:style-name="T3">| Gold <text:s text:c="6"/>| 25,000 $INTR <text:s text:c="4"/>| 160% enlargement; <text:s text:c="4"/>| Beta feature access; premium <text:s text:c="3"/>|</text:span></text:span></text:p>
      <text:p text:style-name="P8"><text:span text:style-name="Source_20_Text"><text:span text:style-name="T3">| <text:s text:c="11"/>| <text:s text:c="17"/>| Radiant Gold Ring <text:s text:c="4"/>| encrypted file transfer sizes <text:s text:c="2"/>|</text:span></text:span></text:p>
      <text:p text:style-name="P8"><text:span text:style-name="Source_20_Text"><text:span text:style-name="T3">+------------+------------------+-----------------------+---------------------------------+</text:span></text:span></text:p>
      <text:p text:style-name="P8"><text:span text:style-name="Source_20_Text"><text:span text:style-name="T3">| Platinum <text:s text:c="2"/>| 100,000 $INTR <text:s text:c="3"/>| 200% maximum size; <text:s text:c="3"/>| Unlocks governance proposals; <text:s text:c="2"/>|</text:span></text:span></text:p>
      <text:p text:style-name="P8"><text:span text:style-name="Source_20_Text"><text:span text:style-name="T3">| <text:s text:c="11"/>| <text:s text:c="17"/>| Animated Premium Glow | infinite zero-knowledge storage |</text:span></text:span></text:p>
      <text:p text:style-name="P8"><text:span text:style-name="Source_20_Text"><text:span text:style-name="T3">+------------+------------------+-----------------------+---------------------------------+</text:span></text:span></text:p>
      <text:h text:style-name="P3" text:outline-level="2">8. Gasless Economic Flow</text:h>
      <text:p text:style-name="P4"><text:bookmark text:name="p-rc_177e85d50fe6707e-1257"/>To remove user onboarding friction and eliminate the requirement for mainstream users to hold native Solana ($SOL) tokens, the system implements an abstracted gasless layout: </text:p>
      <text:p text:style-name="P7"><text:span text:style-name="Source_20_Text"><text:span text:style-name="T3">[ End-User / Node ] </text:span></text:span></text:p>
      <text:p text:style-name="P8"><text:span text:style-name="Source_20_Text"><text:span text:style-name="T3"><text:s text:c="4"/>| Earns/transacts in native $INTR; signs transaction locally[cite: 6]</text:span></text:span></text:p>
      <text:p text:style-name="P8"><text:span text:style-name="Source_20_Text"><text:span text:style-name="T3"><text:s text:c="4"/>v</text:span></text:span></text:p>
      <text:p text:style-name="P8"><text:span text:style-name="Source_20_Text"><text:span text:style-name="T3">[ Treasury Fee Payer ] </text:span></text:span></text:p>
      <text:p text:style-name="P8"><text:span text:style-name="Source_20_Text"><text:span text:style-name="T3"><text:s text:c="4"/>| Intercepts transaction, co-signs, and covers native $SOL gas fees[cite: 6]</text:span></text:span></text:p>
      <text:p text:style-name="P8"><text:span text:style-name="Source_20_Text"><text:span text:style-name="T3"><text:s text:c="4"/>v</text:span></text:span></text:p>
      <text:p text:style-name="P8"><text:span text:style-name="Source_20_Text"><text:span text:style-name="T3">[ Solana Blockchain ] </text:span></text:span></text:p>
      <text:p text:style-name="P8"><text:span text:style-name="Source_20_Text"><text:span text:style-name="T3"><text:s text:c="4"/>| Processes SPL token movement gaslessly; zero $SOL deducted from user[cite: 6]</text:span></text:span></text:p>
      <text:h text:style-name="P3" text:outline-level="2">9. Developer Launch Strategy &amp; Strategic Liquid Sinks</text:h>
      <text:p text:style-name="P4">To liquidate the <text:span text:style-name="T1">10% Developer Launch Reimbursement</text:span> tranche responsibly without negatively affecting market dynamics, the following deployment methods are established:</text:p>
      <text:list text:style-name="L6">
        <text:list-item>
          <text:p text:style-name="P14"><text:span text:style-name="T1">The Dual-Sided Liquidity Pool Model:</text:span> A portion of the 10,000,000 $INTR allocation is paired directly with stablecoins (e.g., USDC) or native SOL to establish the initial decentralized exchange (DEX) liquidity pool on Raydium or Orca. This creates a predictable floor price while generating trading fee revenue for the developer.</text:p>
        </text:list-item>
        <text:list-item>
          <text:p text:style-name="P14"><text:span text:style-name="T1">Pre-Launch Private Allocations:</text:span> Portions of the launch tranche can be offered OTC (Over-The-Counter) to strategic privacy-focused entities, angel advocates, or institutional node operators prior to public market trading. This secures development reimbursement up front at an agreed flat rate, avoiding public price fluctuations.</text:p>
        </text:list-item>
        <text:list-item>
          <text:p text:style-name="P14"><text:span text:style-name="T1">Programmed TWAP Distribution:</text:span> Utilizing an automated Time-Weighted Average Price script, the remaining reimbursement tokens are released incrementally into the AMM pool over a set period following launch. This allows early market demand from organic application downloads to smoothly absorb the circulating volume</text:p>
        </text:list-item>
      </text:lis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rebuchet MS" svg:font-family="'Trebuchet M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1T14:52:33.395653000</meta:creation-date>
    <dc:date>2026-06-21T14:54:38.806306000</dc:date>
    <meta:editing-duration>PT2M6S</meta:editing-duration>
    <meta:editing-cycles>1</meta:editing-cycles>
    <meta:document-statistic meta:table-count="0" meta:image-count="0" meta:object-count="0" meta:page-count="4" meta:paragraph-count="107" meta:word-count="1800" meta:character-count="13029" meta:non-whitespace-character-count="10830"/>
    <meta:generator>LibreOffice/26.2.3.2$MacOSX_AARCH64 LibreOffice_project/70e089b17412e4cb7773e41413306b17a2328c34</meta:generator>
  </office:meta>
</office:document-meta>
</file>