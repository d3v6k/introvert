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antGarde LT Medium" svg:font-family="'AvantGarde LT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AvantGarde LT Medium" fo:font-size="8pt" officeooo:paragraph-rsid="001e7172" style:font-size-asian="8pt" style:font-size-complex="8pt"/>
    </style:style>
    <style:style style:name="P2" style:family="paragraph" style:parent-style-name="Heading_20_2">
      <style:text-properties style:font-name="AvantGarde LT Medium" fo:font-size="8pt" officeooo:paragraph-rsid="001e7172" style:font-size-asian="8pt" style:font-size-complex="8pt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vantGarde LT Medium" fo:font-size="8pt" style:font-size-asian="8pt" style:font-size-complex="8pt"/>
    </style:style>
    <style:style style:name="P4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vantGarde LT Medium" fo:font-size="8pt" style:font-size-asian="8pt" style:font-size-complex="8pt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style:font-size-asian="8pt" style:font-size-complex="8pt"/>
    </style:style>
    <style:style style:name="P6" style:family="paragraph" style:parent-style-name="Horizontal_20_Line">
      <style:text-properties style:font-name="AvantGarde LT Medium" fo:font-size="8pt" style:font-size-asian="8pt" style:font-size-complex="8pt"/>
    </style:style>
    <style:style style:name="P7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vantGarde LT Medium" fo:font-size="8pt" style:font-size-asian="8pt" style:font-size-complex="8pt"/>
    </style:style>
    <style:style style:name="P8" style:family="paragraph" style:parent-style-name="Heading_20_4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vantGarde LT Medium" fo:font-size="8pt" style:font-size-asian="8pt" style:font-size-complex="8pt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style:font-size-asian="8pt" style:font-size-complex="8pt"/>
    </style:style>
    <style:style style:name="P1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style:font-size-asian="8pt" style:font-size-complex="8pt"/>
    </style:style>
    <style:style style:name="P11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style:font-size-asian="8pt" style:font-size-complex="8pt"/>
    </style:style>
    <style:style style:name="P12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style:font-size-asian="8pt" style:font-size-complex="8pt"/>
    </style:style>
    <style:style style:name="P13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style:font-size-asian="8pt" style:font-size-complex="8pt"/>
    </style:style>
    <style:style style:name="P14" style:family="paragraph" style:parent-style-name="Standard">
      <style:text-properties style:font-name="AvantGarde LT Medium" fo:font-size="8pt" style:font-size-asian="8pt" style:font-size-complex="8pt"/>
    </style:style>
    <style:style style:name="T1" style:family="text">
      <style:text-properties officeooo:rsid="001e7172"/>
    </style:style>
    <style:style style:name="T2" style:family="text">
      <style:text-properties fo:font-weight="bold"/>
    </style:style>
    <style:style style:name="T3" style:family="text">
      <style:text-properties style:text-position="super 58%" officeooo:rsid="001e717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INTROVERT</text:span> </text:h>
      <text:h text:style-name="P2" text:outline-level="2">1. The Overall Vision: What is Introvert?</text:h>
      <text:p text:style-name="P3"><text:span text:style-name="T2">Introvert</text:span> is a privacy-first, fully decentralized peer-to-peer (P2P) communication and data-syncing platform.</text:p>
      <text:p text:style-name="P3">Unlike traditional apps that store your messages, files, and identity on centralized corporate servers (like AWS or Google Cloud), <text:span text:style-name="T2">Introvert stores 100% of your private data exclusively on your own devices</text:span> (e.g., your phone and laptop).</text:p>
      <text:h text:style-name="P4" text:outline-level="3">The Core Value Proposition</text:h>
      <text:list text:style-name="L1">
        <text:list-item>
          <text:p text:style-name="P5"><text:span text:style-name="T2">Zero Trust, Zero Footprint:</text:span> No centralized databases mean there's nothing to hack, leak, or sell.</text:p>
        </text:list-item>
        <text:list-item>
          <text:p text:style-name="P5"><text:span text:style-name="T2">Instant Worldwide Syncing:</text:span> Devices bypass firewalls automatically using a custom "Relay-First, Hole-Punch Second" networking model. Connections feel instant, but data transfers directly between users.</text:p>
        </text:list-item>
        <text:list-item>
          <text:p text:style-name="P5"><text:span text:style-name="T2">Incentivized Participation:</text:span> Users who support the network by acting as reliable nodes or routing data are rewarded directly via a decentralized token ecosystem.</text:p>
        </text:list-item>
      </text:list>
      <text:p text:style-name="P6"/>
      <text:h text:style-name="P7" text:outline-level="2">2. Where We Are <text:span text:style-name="T1">at</text:span> &amp; What Is Pending (<text:span text:style-name="T1">3</text:span><text:span text:style-name="T3">rd</text:span><text:span text:style-name="T1"> May 2026</text:span>)</text:h>
      <text:h text:style-name="P4" text:outline-level="3">🟢 What We Have Already Built (The Foundations)</text:h>
      <text:h text:style-name="P8" text:outline-level="4">A. Advanced Networking Infrastructure</text:h>
      <text:p text:style-name="P3">We have built and deployed a permanent <text:span text:style-name="T2">Root Bootstrap Node (RBN)</text:span> on an Alibaba Cloud server. This server functions as the network’s "phonebook" and signaling point. It uses less than $6\text{ MB}$ of storage to connect tens of thousands of users without ever seeing their private encrypted data.</text:p>
      <text:h text:style-name="P8" text:outline-level="4">B. The Core Syncing Engine</text:h>
      <text:p text:style-name="P3">Our native engine—written in <text:span text:style-name="T2">Rust</text:span> for maximum speed and memory safety—is operational. It features:</text:p>
      <text:list text:style-name="L2">
        <text:list-item>
          <text:p text:style-name="P9"><text:span text:style-name="T2">libp2p NAT Traversal:</text:span> Advanced hole punching that lets your home computer talk directly to your phone on cellular data.</text:p>
        </text:list-item>
        <text:list-item>
          <text:p text:style-name="P9"><text:span text:style-name="T2">Encrypted On-Device Databases:</text:span> Using localized, highly secure databases to keep keys and message histories safe on disk.</text:p>
        </text:list-item>
      </text:list>
      <text:h text:style-name="P8" text:outline-level="4">C. Cross-Platform App</text:h>
      <text:p text:style-name="P3">The mobile and desktop user interface is built using <text:span text:style-name="T2">Flutter</text:span>. We have successfully bridged the fast Rust backend directly into the frontend, making the app run natively on <text:span text:style-name="T2">Linux, Android, and iOS</text:span>.</text:p>
      <text:p text:style-name="P6"/>
      <text:h text:style-name="P4" text:outline-level="3">🟡 What is Pending (The Roadmap to Launch)</text:h>
      <text:p text:style-name="P3">To achieve our ultimate vision, our next engineering and business phases focus on the following four milestones:</text:p>
      <text:h text:style-name="P4" text:outline-level="3">Milestone 1: Finalize a Stable, Functional Product</text:h>
      <text:list text:style-name="L3">
        <text:list-item>
          <text:p text:style-name="P10"><text:span text:style-name="T2">Direct Sync Optimization:</text:span> We are stress-testing and fine-tuning direct device-to-device connections on restrictive mobile networks to ensure syncing is seamless under any condition.</text:p>
        </text:list-item>
        <text:list-item>
          <text:p text:style-name="P10"><text:span text:style-name="T2">End-User Polishing:</text:span> Finalizing the blueprint-themed visual interface to make joining the decentralized network as easy as downloading a normal messaging app.</text:p>
        </text:list-item>
      </text:list>
      <text:h text:style-name="P4" text:outline-level="3">Milestone 2: Build &amp; Audit the Rewards System</text:h>
      <text:list text:style-name="L4">
        <text:list-item>
          <text:p text:style-name="P11"><text:span text:style-name="T2">Decentralized Tracking:</text:span> We need to finalize the code that tracks node uptime and data routing via cryptographic digital receipts, without relying on a central server.</text:p>
        </text:list-item>
        <text:list-item>
          <text:p text:style-name="P11"><text:span text:style-name="T2">The Claim Engine:</text:span> Developing the calculation model that bundles daily activity into a lightweight summary (Merkle Tree). Users can securely claim their incentives whenever they want with minimal network strain.</text:p>
        </text:list-item>
      </text:list>
      <text:h text:style-name="P4" text:outline-level="3"><text:soft-page-break/>Milestone 3: Invite-Only Beta &amp; Web Presence</text:h>
      <text:list text:style-name="L5">
        <text:list-item>
          <text:p text:style-name="P12"><text:span text:style-name="T2">Website &amp; PR:</text:span> Launching a sleek, technical website explaining the underlying tech, alongside a press kit for early investors and tech communities.</text:p>
        </text:list-item>
        <text:list-item>
          <text:p text:style-name="P12"><text:span text:style-name="T2">Invite-Only Testnet (1,000 Users):</text:span> Onboarding an initial cohort of 1,000 private testers via invite codes to stress-test our cloud bootstrap node and gather feedback on sync speeds.</text:p>
        </text:list-item>
      </text:list>
      <text:h text:style-name="P4" text:outline-level="3">Milestone 4: Mainnet Launch &amp; Token Generation (TGE)</text:h>
      <text:list text:style-name="L6">
        <text:list-item>
          <text:p text:style-name="P13"><text:span text:style-name="T2">Token Launch:</text:span> Partnering with professional launchpads and teams specializing in Initial Coin Offerings (ICOs) or Token Generation Events.</text:p>
        </text:list-item>
        <text:list-item>
          <text:p text:style-name="P13"><text:span text:style-name="T2">Mainnet Deployment:</text:span> Deploying the finalized rewards architecture on a secure blockchain layer to officially launch the token and open the network to the public.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antGarde LT Medium" svg:font-family="'AvantGarde LT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04:33:38.641597095</meta:creation-date>
    <dc:date>2026-05-03T04:35:56.321332948</dc:date>
    <meta:editing-duration>PT2M18S</meta:editing-duration>
    <meta:editing-cycles>1</meta:editing-cycles>
    <meta:document-statistic meta:table-count="0" meta:image-count="0" meta:object-count="0" meta:page-count="2" meta:paragraph-count="32" meta:word-count="544" meta:character-count="3583" meta:non-whitespace-character-count="3085"/>
    <meta:generator>LibreOffice/25.8.6.2$Linux_X86_64 LibreOffice_project/580$Build-2</meta:generator>
  </office:meta>
</office:document-meta>
</file>