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DejaVu Sans Condensed" fo:font-size="8pt" style:font-size-asian="8pt" style:font-size-complex="8pt"/>
    </style:style>
    <style:style style:name="P2" style:family="paragraph" style:parent-style-name="Horizontal_20_Line">
      <style:text-properties style:font-name="DejaVu Sans Condensed" fo:font-size="8pt" style:font-size-asian="8pt" style:font-size-complex="8pt"/>
    </style:style>
    <style:style style:name="P3" style:family="paragraph" style:parent-style-name="Heading_20_2">
      <style:text-properties style:font-name="DejaVu Sans Condensed" fo:font-size="8pt" style:font-size-asian="8pt" style:font-size-complex="8pt"/>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1">
      <style:text-properties style:font-name="DejaVu Sans Condensed" fo:font-size="8pt" style:font-size-asian="8pt" style:font-size-complex="8pt"/>
    </style:style>
    <style:style style:name="P8" style:family="paragraph" style:parent-style-name="Text_20_body" style:list-style-name="L2">
      <style:text-properties style:font-name="DejaVu Sans Condensed" fo:font-size="8pt" style:font-size-asian="8pt" style:font-size-complex="8pt"/>
    </style:style>
    <style:style style:name="P9" style:family="paragraph" style:parent-style-name="Text_20_body" style:list-style-name="L3">
      <style:text-properties style:font-name="DejaVu Sans Condensed" fo:font-size="8pt" style:font-size-asian="8pt" style:font-size-complex="8pt"/>
    </style:style>
    <style:style style:name="P10" style:family="paragraph" style:parent-style-name="Text_20_body" style:list-style-name="L4"/>
    <style:style style:name="P11" style:family="paragraph" style:parent-style-name="Text_20_body" style:list-style-name="L4">
      <style:text-properties style:font-name="DejaVu Sans Condensed" fo:font-size="8pt" style:font-size-asian="8pt" style:font-size-complex="8pt"/>
    </style:style>
    <style:style style:name="P12" style:family="paragraph" style:parent-style-name="Text_20_body" style:list-style-name="L5">
      <style:text-properties style:font-name="DejaVu Sans Condensed" fo:font-size="8pt" style:font-size-asian="8pt" style:font-size-complex="8pt"/>
    </style:style>
    <style:style style:name="P13" style:family="paragraph" style:parent-style-name="Text_20_body" style:list-style-name="L6">
      <style:text-properties style:font-name="DejaVu Sans Condensed" fo:font-size="8pt" style:font-size-asian="8pt" style:font-size-complex="8pt"/>
    </style:style>
    <style:style style:name="P14" style:family="paragraph" style:parent-style-name="Standard">
      <style:text-properties style:font-name="DejaVu Sans Condensed" fo:font-size="8pt" style:font-size-asian="8pt" style:font-size-complex="8pt"/>
    </style:style>
    <style:style style:name="T1" style:family="text">
      <style:text-properties fo:font-weight="bold"/>
    </style:style>
    <style:style style:name="T2" style:family="text">
      <style:text-properties style:font-name="DejaVu Sans Condensed" fo:font-size="8pt" style:font-size-asian="8pt" style:font-size-complex="8pt"/>
    </style:style>
    <style:style style:name="T3" style:family="text">
      <style:text-properties style:font-name="DejaVu Sans Condensed" fo:font-size="8pt" fo:font-weight="bold" style:font-size-asian="8pt" style:font-size-complex="8pt"/>
    </style:style>
    <style:style style:name="T4" style:family="text">
      <style:text-properties fo:font-style="italic"/>
    </style:style>
    <style:style style:name="T5" style:family="text">
      <style:text-properties style:font-name="DejaVu Sans Condensed" fo:font-size="8pt" officeooo:rsid="00094f4e" style:font-size-asian="8pt" style:font-size-complex="8pt"/>
    </style:style>
    <style:style style:name="T6" style:family="text">
      <style:text-properties fo:font-weight="bold" officeooo:rsid="00094f4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understand <text:span text:style-name="T1">Introvert</text:span> from the ground up, think of it as a complete ecosystem that eliminates the middleman. Traditional messaging apps rely on massive corporate servers to verify who you are, store your messages, and track your data.</text:p>
      <text:p text:style-name="P1">Introvert replaces that entire structure using a few highly specialized tools. Here is a simple breakdown of the core elements being used and exactly why we use them.</text:p>
      <text:p text:style-name="P2"/>
      <text:h text:style-name="P3" text:outline-level="2">🛠️ The Core Technical Stack</text:h>
      <text:p text:style-name="P4"><text:span text:style-name="Source_20_Text"><text:span text:style-name="T2"><text:s/>┌────────────────────────────────────────────────────────┐</text:span></text:span></text:p>
      <text:p text:style-name="Preformatted_20_Text"><text:span text:style-name="Source_20_Text"><text:span text:style-name="T2"><text:s/>│ <text:s text:c="21"/>FLUTTER UI <text:s text:c="23"/><text:tab/><text:tab/><text:tab/>│</text:span></text:span></text:p>
      <text:p text:style-name="Preformatted_20_Text"><text:span text:style-name="Source_20_Text"><text:span text:style-name="T2"><text:s/>│ <text:s text:c="3"/>(Beautiful, simple interface for the user) <text:s text:c="9"/><text:tab/><text:tab/>│</text:span></text:span></text:p>
      <text:p text:style-name="Preformatted_20_Text"><text:span text:style-name="Source_20_Text"><text:span text:style-name="T2"><text:s/>└──────────────────────────┬─────────────────────────────┘</text:span></text:span></text:p>
      <text:p text:style-name="Preformatted_20_Text"><text:span text:style-name="Source_20_Text"><text:span text:style-name="T2"><text:s text:c="28"/>▼ [dart:ffi]</text:span></text:span></text:p>
      <text:p text:style-name="Preformatted_20_Text"><text:span text:style-name="Source_20_Text"><text:span text:style-name="T2"><text:s/>┌────────────────────────────────────────────────────────┐</text:span></text:span></text:p>
      <text:p text:style-name="Preformatted_20_Text"><text:span text:style-name="Source_20_Text"><text:span text:style-name="T2"><text:s/>│ <text:s text:c="19"/>RUST CORE ENGINE <text:s text:c="19"/><text:tab/><text:tab/><text:tab/>│</text:span></text:span></text:p>
      <text:p text:style-name="Preformatted_20_Text"><text:span text:style-name="Source_20_Text"><text:span text:style-name="T2"><text:s/>│ <text:s text:c="3"/>(Heavy-lifting: cryptography, storage, mesh network)<text:tab/><text:tab/>│</text:span></text:span></text:p>
      <text:p text:style-name="Preformatted_20_Text"><text:span text:style-name="Source_20_Text"><text:span text:style-name="T2"><text:s/>└──────────────────────────┬─────────────────────────────┘</text:span></text:span></text:p>
      <text:p text:style-name="Preformatted_20_Text"><text:span text:style-name="Source_20_Text"><text:span text:style-name="T2"><text:s text:c="28"/>▼</text:span></text:span></text:p>
      <text:p text:style-name="Preformatted_20_Text"><text:span text:style-name="Source_20_Text"><text:span text:style-name="T2"><text:s/>┌────────────────────────────────────────────────────────┐</text:span></text:span></text:p>
      <text:p text:style-name="Preformatted_20_Text"><text:span text:style-name="Source_20_Text"><text:span text:style-name="T2"><text:s/>│ <text:s text:c="14"/>UNDERLYING CORE ELEMENTS <text:s text:c="16"/><text:tab/><text:tab/>│</text:span></text:span></text:p>
      <text:p text:style-name="Preformatted_20_Text"><text:span text:style-name="Source_20_Text"><text:span text:style-name="T2"><text:s/>│ <text:s text:c="54"/><text:tab/><text:tab/><text:tab/><text:tab/>│</text:span></text:span></text:p>
      <text:p text:style-name="Preformatted_20_Text"><text:span text:style-name="Source_20_Text"><text:span text:style-name="T2"><text:s/>│ <text:s text:c="2"/>- Single-Seed Identity (Ed25519) <text:s text:c="20"/><text:tab/><text:tab/>│</text:span></text:span></text:p>
      <text:p text:style-name="Preformatted_20_Text"><text:span text:style-name="Source_20_Text"><text:span text:style-name="T2"><text:s/>│ <text:s text:c="2"/>- Local Encryption (SQLCipher) <text:s text:c="22"/><text:tab/><text:tab/><text:tab/>│</text:span></text:span></text:p>
      <text:p text:style-name="Preformatted_20_Text"><text:span text:style-name="Source_20_Text"><text:span text:style-name="T2"><text:s/>│ <text:s text:c="2"/>- Peer-to-Peer Routing (libp2p &amp; Kademlia DHT) <text:s text:c="6"/><text:tab/><text:tab/>│</text:span></text:span></text:p>
      <text:p text:style-name="Preformatted_20_Text"><text:span text:style-name="Source_20_Text"><text:span text:style-name="T2"><text:s/>│ <text:s text:c="2"/>- Message Security (Double Ratchet E2EE) <text:s text:c="12"/><text:tab/><text:tab/>│</text:span></text:span></text:p>
      <text:p text:style-name="Preformatted_20_Text"><text:span text:style-name="Source_20_Text"><text:span text:style-name="T2"><text:s/>│ <text:s text:c="2"/>- Solana Token Rewards (INTR Token) <text:s text:c="17"/><text:tab/><text:tab/>│</text:span></text:span></text:p>
      <text:p text:style-name="P5"><text:span text:style-name="Source_20_Text"><text:span text:style-name="T2"><text:s/>└────────────────────────────────────────────────────────┘</text:span></text:span></text:p>
      <text:p text:style-name="P2"/>
      <text:h text:style-name="P3" text:outline-level="2">1. 🦀 The Rust Core Engine &amp; Dart FFI</text:h>
      <text:list text:style-name="L1">
        <text:list-item>
          <text:p text:style-name="P6"><text:span text:style-name="T3">What it is:</text:span><text:span text:style-name="T2"> Rust is a high-performance, ultra-secure programming language that handles our backend. </text:span><text:span text:style-name="Source_20_Text"><text:span text:style-name="T2">dart:ffi</text:span></text:span><text:span text:style-name="T2"> is the bridge that links our frontend directly to Rust.</text:span></text:p>
        </text:list-item>
        <text:list-item>
          <text:p text:style-name="P7"><text:span text:style-name="T1">Why we use it:</text:span> We want our security, networking, and encryption to run at native speed without any lag or memory leaks. Rust does the heavy lifting, while Flutter creates the interface.</text:p>
        </text:list-item>
      </text:list>
      <text:h text:style-name="P3" text:outline-level="2">2. 🔑 Single-Seed Identity (Ed25519)</text:h>
      <text:list text:style-name="L2">
        <text:list-item>
          <text:p text:style-name="P8"><text:span text:style-name="T1">What it is:</text:span> A single 12-word seed phrase that generates your master cryptographic keys.</text:p>
        </text:list-item>
        <text:list-item>
          <text:p text:style-name="P8"><text:span text:style-name="T1">Why we use it:</text:span> Instead of using passwords, phone numbers, or email addresses, your identity is pure math. This single seed generates your chat identity, unlocks your local database, and acts as your on-chain wallet.</text:p>
        </text:list-item>
      </text:list>
      <text:h text:style-name="P3" text:outline-level="2">3. 🛡️ SQLCipher (Encrypted Local Storage)</text:h>
      <text:list text:style-name="L3">
        <text:list-item>
          <text:p text:style-name="P9"><text:span text:style-name="T1">What it is:</text:span> A highly secure, encrypted version of a standard local database.</text:p>
        </text:list-item>
        <text:list-item>
          <text:p text:style-name="P9"><text:span text:style-name="T1">Why we use it:</text:span> Since there is no central server, your chat history is stored directly on your device. SQLCipher ensures that even if someone steals your physical device, they cannot read your database without your master key.</text:p>
        </text:list-item>
      </text:list>
      <text:h text:style-name="P3" text:outline-level="2">4. 🌍 libp2p &amp; Kademlia DHT (The Mesh Network)</text:h>
      <text:list text:style-name="L4">
        <text:list-item>
          <text:p text:style-name="P10"><text:span text:style-name="T3">What it is:</text:span><text:span text:style-name="T2"> </text:span><text:span text:style-name="Source_20_Text"><text:span text:style-name="T2">libp2p</text:span></text:span><text:span text:style-name="T2"> is a framework for peer-to-peer networking, and </text:span><text:span text:style-name="Source_20_Text"><text:span text:style-name="T2">Kademlia DHT</text:span></text:span><text:span text:style-name="T2"> is like a decentralized phone book.</text:span></text:p>
        </text:list-item>
        <text:list-item>
          <text:p text:style-name="P11"><text:span text:style-name="T1">Why we use it:</text:span> Instead of sending your messages through a corporate server (like WhatsApp or Telegram), your device connects directly to other peers. The Kademlia DHT helps your app find exactly where your friends are on the internet without revealing their real-world IP addresses.</text:p>
        </text:list-item>
      </text:list>
      <text:h text:style-name="P3" text:outline-level="2">5. 🔒 The Double Ratchet (End-to-End Encryption)</text:h>
      <text:list text:style-name="L5">
        <text:list-item>
          <text:p text:style-name="P12"><text:span text:style-name="T1">What it is:</text:span> A dynamic encryption system that changes the security keys after <text:span text:style-name="T4">every single message</text:span> sent or received.</text:p>
        </text:list-item>
        <text:list-item>
          <text:p text:style-name="P12"><text:soft-page-break/><text:span text:style-name="T1">Why we use it:</text:span> It guarantees complete security. If a hacker somehow manages to steal one of your temporary message keys, they still cannot read your past messages (Forward Secrecy) or decrypt any future messages (Break-in Recovery).</text:p>
        </text:list-item>
      </text:list>
      <text:h text:style-name="Heading_20_2" text:outline-level="2"><text:span text:style-name="T2">6. 🪙 The </text:span><text:span text:style-name="T5">Introvert </text:span><text:span text:style-name="T2">Token (</text:span><text:span text:style-name="Source_20_Text"><text:span text:style-name="T2">INTR</text:span></text:span><text:span text:style-name="T2">)</text:span></text:h>
      <text:list text:style-name="L6">
        <text:list-item>
          <text:p text:style-name="P13"><text:span text:style-name="T1">What it is:</text:span> A custom digital currency minted directly on the Solana Mainnet.</text:p>
        </text:list-item>
        <text:list-item>
          <text:p text:style-name="P13"><text:span text:style-name="T1">Why we use it:</text:span> Because there are no corporate servers to pass messages along, we rely on independent "Anchor Nodes" (run by desktop users) to act as digital mailboxes. The <text:span text:style-name="T1">INTR</text:span> token acts as a rewards system—automatically paying those Anchor nodes for their storage and network uptime.</text:p>
        </text:list-item>
      </text:list>
      <text:p text:style-name="P1"><text:span text:style-name="T6">I</text:span><text:span text:style-name="T1">NTRT </text:span><text:span text:style-name="T6">t</text:span><text:span text:style-name="T1">he Introvert Token.</text:span> A custom SPL token minted on Solana.Used strictly as the payment currency for the platform. Users pay it to Anchor Nodes to reward them for their message caching, storage, and server uptime.</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5:48:39.451653950</meta:creation-date>
    <dc:date>2026-05-01T15:54:58.014921814</dc:date>
    <meta:editing-duration>PT1M42S</meta:editing-duration>
    <meta:editing-cycles>2</meta:editing-cycles>
    <meta:generator>LibreOffice/25.8.6.2$Linux_X86_64 LibreOffice_project/580$Build-2</meta:generator>
    <meta:document-statistic meta:table-count="0" meta:image-count="0" meta:object-count="0" meta:page-count="2" meta:paragraph-count="41" meta:word-count="576" meta:character-count="4046" meta:non-whitespace-character-count="3157"/>
  </office:meta>
</office:document-meta>
</file>