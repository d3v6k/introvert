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785in" table:align="left"/>
    </style:style>
    <style:style style:name="Table1.A" style:family="table-column">
      <style:table-column-properties style:column-width="0.7181in"/>
    </style:style>
    <style:style style:name="Table1.B" style:family="table-column">
      <style:table-column-properties style:column-width="1.8313in"/>
    </style:style>
    <style:style style:name="Table1.C" style:family="table-column">
      <style:table-column-properties style:column-width="1.629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text-properties style:font-name="DejaVu Sans Condensed" fo:font-size="8p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style:font-size-asian="8pt" style:font-size-complex="8pt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DejaVu Sans Condensed" fo:font-size="8pt" fo:font-weight="bold" style:font-size-asian="8pt" style:font-size-complex="8pt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Condensed" fo:font-size="8pt" style:font-size-asian="8pt" style:font-size-complex="8p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Condensed" fo:font-size="8pt" style:font-size-asian="8pt" style:font-size-complex="8pt"/>
    </style:style>
    <style:style style:name="P7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Condensed" fo:font-size="8pt" style:font-size-asian="8pt" style:font-size-complex="8pt"/>
    </style:style>
    <style:style style:name="P8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Condensed" fo:font-size="8pt" style:font-size-asian="8pt" style:font-size-complex="8pt"/>
    </style:style>
    <style:style style:name="P9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0" style:family="paragraph" style:parent-style-name="Horizontal_20_Line">
      <style:text-properties style:font-name="DejaVu Sans Condensed" fo:font-size="8pt" style:font-size-asian="8pt" style:font-size-complex="8p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fo:font-weight="bold" style:font-size-asian="8pt" style:font-size-complex="8pt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Condensed" fo:font-size="8pt" style:font-size-asian="8pt" style:font-size-complex="8pt"/>
    </style:style>
    <style:style style:name="P14" style:family="paragraph" style:parent-style-name="Standard">
      <style:text-properties style:font-name="DejaVu Sans Condensed" fo:font-size="8pt" style:font-size-asian="8pt" style:font-size-complex="8pt"/>
    </style:style>
    <style:style style:name="T1" style:family="text">
      <style:text-properties officeooo:rsid="000b999f"/>
    </style:style>
    <style:style style:name="T2" style:family="text">
      <style:text-properties fo:font-weight="bold"/>
    </style:style>
    <style:style style:name="T3" style:family="text">
      <style:text-properties style:font-name="DejaVu Sans Condensed" fo:font-size="8pt" fo:font-weight="bold" style:font-size-asian="8pt" style:font-size-complex="8pt"/>
    </style:style>
    <style:style style:name="T4" style:family="text">
      <style:text-properties style:font-name="DejaVu Sans Condensed" fo:font-size="8pt" style:font-size-asian="8pt" style:font-size-complex="8pt"/>
    </style:style>
    <style:style style:name="T5" style:family="text">
      <style:text-properties style:font-family-asian="'Google Sans Text', sans-serif" style:font-family-complex="'Google Sans Text', sans-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trovert Project Progress Report: <text:span text:style-name="T1">30 </text:span>April 2026</text:h>
      <text:p text:style-name="P2"><text:bookmark text:name="p-rc_c2b634e60bb58ebc-697"/>We have successfully transitioned from a conceptual architectural plan to a functional, modular Rust-based P2P engine. The project has reached a high level of technical maturity, particularly in the core networking and local-first storage layers. </text:p>
      <text:h text:style-name="P3" text:outline-level="3">1. Core Infrastructure (Completed)</text:h>
      <text:list text:style-name="L1">
        <text:list-item>
          <text:p text:style-name="P4"><text:bookmark text:name="p-rc_c2b634e60bb58ebc-698"/><text:span text:style-name="T2">Modular Workspace</text:span>: Established a robust Rust workspace containing binary entry points for CLI testing and a library for core logic. </text:p>
        </text:list-item>
        <text:list-item>
          <text:p text:style-name="P5"><text:bookmark text:name="p-rc_c2b634e60bb58ebc-699"/><text:span text:style-name="T3">Persistent Identity</text:span><text:span text:style-name="T4">: Implemented an identity module using </text:span><text:span text:style-name="T3">Ed25519</text:span><text:span text:style-name="T4"> that generates stable peer IDs and securely persists secret keys with restricted (</text:span><text:span text:style-name="Source_20_Text"><text:span text:style-name="T4">0600</text:span></text:span><text:span text:style-name="T4">) file permissions. </text:span></text:p>
        </text:list-item>
        <text:list-item>
          <text:p text:style-name="P5"><text:bookmark text:name="p-rc_c2b634e60bb58ebc-700"/><text:span text:style-name="T3">Hybrid Mesh Networking</text:span><text:span text:style-name="T4">: Configured a </text:span><text:span text:style-name="Source_20_Text"><text:span text:style-name="T4">libp2p</text:span></text:span><text:span text:style-name="T4"> swarm (v0.56.0) utilizing </text:span><text:span text:style-name="T3">QUIC</text:span><text:span text:style-name="T4"> for mobile roaming, </text:span><text:span text:style-name="T3">WebRTC</text:span><text:span text:style-name="T4"> for NAT traversal, and </text:span><text:span text:style-name="T3">Kademlia DHT</text:span><text:span text:style-name="T4"> for decentralized peer discovery. </text:span></text:p>
        </text:list-item>
      </text:list>
      <text:h text:style-name="P3" text:outline-level="3">2. Data &amp; Consistency (Completed)</text:h>
      <text:list text:style-name="L2">
        <text:list-item>
          <text:p text:style-name="P6"><text:bookmark text:name="p-rc_c2b634e60bb58ebc-701"/><text:span text:style-name="T2">Secure Storage</text:span>: Integrated <text:span text:style-name="T2">SQLCipher</text:span> for database encryption, with keys derived from the node’s cryptographic identity via <text:span text:style-name="T2">HKDF-SHA256</text:span>. </text:p>
        </text:list-item>
        <text:list-item>
          <text:p text:style-name="P6"><text:bookmark text:name="p-rc_c2b634e60bb58ebc-702"/><text:span text:style-name="T2">Causal Engine</text:span>: Successfully implemented <text:span text:style-name="T2">Lamport Clocks</text:span> and <text:span text:style-name="T2">Vector Clocks</text:span> to handle message ordering and concurrent edits in a decentralized environment. </text:p>
        </text:list-item>
        <text:list-item>
          <text:p text:style-name="P6"><text:bookmark text:name="p-rc_c2b634e60bb58ebc-703"/><text:span text:style-name="T2">Group State CRDTs</text:span>: Developed a conflict-free replicated data type (CRDT) logic to manage group memberships deterministically across peers. </text:p>
        </text:list-item>
      </text:list>
      <text:h text:style-name="P3" text:outline-level="3">3. Infrastructure &amp; Real-Time Services (Completed)</text:h>
      <text:list text:style-name="L3">
        <text:list-item>
          <text:p text:style-name="P7"><text:bookmark text:name="p-rc_c2b634e60bb58ebc-704"/><text:span text:style-name="T2">The Anchor Service</text:span>: Built stability heuristics allowing nodes to promote themselves to "Anchors" after 30 minutes of uptime, providing zero-knowledge "Store and Forward" mailbox services. </text:p>
        </text:list-item>
        <text:list-item>
          <text:p text:style-name="P7"><text:bookmark text:name="p-rc_c2b634e60bb58ebc-705"/><text:span text:style-name="T2">VoIP &amp; FFI Bridge</text:span>: Designed the <text:span text:style-name="T2">C-ABI</text:span> boundary to manage stateful <text:span text:style-name="T2">Opus</text:span> audio sessions, enabling the Rust engine to interface with mobile call handlers. </text:p>
        </text:list-item>
      </text:list>
      <text:h text:style-name="P3" text:outline-level="3">4. Strategic Pivot &amp; Current Status (Ongoing)</text:h>
      <text:list text:style-name="L4">
        <text:list-item>
          <text:p text:style-name="P8"><text:bookmark text:name="p-rc_c2b634e60bb58ebc-706"/><text:span text:style-name="T2">Distribution Shift</text:span>: Pivoted from a Flutter-based App Store model to a <text:span text:style-name="T2">side-loaded Capacitor app</text:span> to bypass centralized restrictions. </text:p>
        </text:list-item>
        <text:list-item>
          <text:p text:style-name="P8"><text:bookmark text:name="p-rc_c2b634e60bb58ebc-707"/><text:span text:style-name="T2">Incentive Layer (In Progress)</text:span>: Gemini CLI is currently integrating the <text:span text:style-name="T2">Solana</text:span> blockchain layer. </text:p>
          <text:list>
            <text:list-item>
              <text:p text:style-name="P9"><text:bookmark text:name="p-rc_c2b634e60bb58ebc-708"/><text:span text:style-name="T3">Wallet Derivation</text:span><text:span text:style-name="T4">: Extending the </text:span><text:span text:style-name="Source_20_Text"><text:span text:style-name="T4">NodeIdentity</text:span></text:span><text:span text:style-name="T4"> to function as a Solana-compatible wallet. </text:span></text:p>
            </text:list-item>
            <text:list-item>
              <text:p text:style-name="P8"><text:bookmark text:name="p-rc_c2b634e60bb58ebc-709"/><text:span text:style-name="T2">Token Economics</text:span>: Implementing the logic for a native <text:span text:style-name="T2">Introvert SPL Token</text:span> to reward Anchor nodes and meter network usage. </text:p>
            </text:list-item>
          </text:list>
        </text:list-item>
      </text:list>
      <text:p text:style-name="P10"/>
      <text:h text:style-name="P3" text:outline-level="3">Summary of Achievement vs. Roadmap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<text:span text:style-name="Strong_20_Emphasis"><text:span text:style-name="T4">Phase</text:span></text:span></text:p>
            </table:table-cell>
            <table:table-cell table:style-name="Table1.A1" office:value-type="string">
              <text:p text:style-name="P11"><text:span text:style-name="Strong_20_Emphasis"><text:span text:style-name="T4">Description</text:span></text:span></text:p>
            </table:table-cell>
            <table:table-cell table:style-name="Table1.A1" office:value-type="string">
              <text:p text:style-name="P11"><text:span text:style-name="Strong_20_Emphasis"><text:span text:style-name="T4">Statu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2">Phase 1</text:p>
          </table:table-cell>
          <table:table-cell table:style-name="Table1.A1" office:value-type="string">
            <text:p text:style-name="P13">Networking &amp; Identity</text:p>
          </table:table-cell>
          <table:table-cell table:style-name="Table1.A1" office:value-type="string">
            <text:p text:style-name="P12">100% Complete<text:bookmark text:name="p-rc_c2b634e60bb58ebc-710"/><text:span text:style-name="T5"/></text:p>
          </table:table-cell>
        </table:table-row>
        <table:table-row>
          <table:table-cell table:style-name="Table1.A1" office:value-type="string">
            <text:p text:style-name="P12">Phase 2</text:p>
          </table:table-cell>
          <table:table-cell table:style-name="Table1.A1" office:value-type="string">
            <text:p text:style-name="P13">Local Data &amp; State</text:p>
          </table:table-cell>
          <table:table-cell table:style-name="Table1.A1" office:value-type="string">
            <text:p text:style-name="P12">100% Complete<text:bookmark text:name="p-rc_c2b634e60bb58ebc-711"/><text:span text:style-name="T5"/></text:p>
          </table:table-cell>
        </table:table-row>
        <table:table-row>
          <table:table-cell table:style-name="Table1.A1" office:value-type="string">
            <text:p text:style-name="P12">Phase 3</text:p>
          </table:table-cell>
          <table:table-cell table:style-name="Table1.A1" office:value-type="string">
            <text:p text:style-name="P13">Anchor Service</text:p>
          </table:table-cell>
          <table:table-cell table:style-name="Table1.A1" office:value-type="string">
            <text:p text:style-name="P12">100% Complete<text:bookmark text:name="p-rc_c2b634e60bb58ebc-712"/><text:span text:style-name="T5"/></text:p>
          </table:table-cell>
        </table:table-row>
        <table:table-row>
          <table:table-cell table:style-name="Table1.A1" office:value-type="string">
            <text:p text:style-name="P12">Phase 4</text:p>
          </table:table-cell>
          <table:table-cell table:style-name="Table1.A1" office:value-type="string">
            <text:p text:style-name="P13">VoIP &amp; FFI Bridge</text:p>
          </table:table-cell>
          <table:table-cell table:style-name="Table1.A1" office:value-type="string">
            <text:p text:style-name="P12">100% Complete<text:bookmark text:name="p-rc_c2b634e60bb58ebc-713"/><text:span text:style-name="T5"/></text:p>
          </table:table-cell>
        </table:table-row>
        <table:table-row>
          <table:table-cell table:style-name="Table1.A1" office:value-type="string">
            <text:p text:style-name="P12">Phase 5</text:p>
          </table:table-cell>
          <table:table-cell table:style-name="Table1.A1" office:value-type="string">
            <text:p text:style-name="P13">Capacitor UI Binding</text:p>
          </table:table-cell>
          <table:table-cell table:style-name="Table1.A1" office:value-type="string">
            <text:p text:style-name="P12">In Progress<text:bookmark text:name="p-rc_c2b634e60bb58ebc-714"/><text:span text:style-name="T5"/></text:p>
          </table:table-cell>
        </table:table-row>
        <table:table-row>
          <table:table-cell table:style-name="Table1.A1" office:value-type="string">
            <text:p text:style-name="P12">Phase 6</text:p>
          </table:table-cell>
          <table:table-cell table:style-name="Table1.A1" office:value-type="string">
            <text:p text:style-name="P13">Solana Incentive Layer</text:p>
          </table:table-cell>
          <table:table-cell table:style-name="Table1.A1" office:value-type="string">
            <text:p text:style-name="P12">Active/In Progress<text:bookmark text:name="p-rc_c2b634e60bb58ebc-715"/><text:span text:style-name="T5"/></text:p>
          </table:table-cell>
        </table:table-row>
      </table:table>
      <text:p text:style-name="P2"><text:bookmark text:name="p-rc_c2b634e60bb58ebc-716"/><text:span text:style-name="T2">Next Major Milestone</text:span>: Deployment of the first side-loadable APK/AppImage featuring the integrated Solana wallet and the "White Tech" blueprint interface. 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22:56:53.194306502</meta:creation-date>
    <dc:date>2026-04-30T22:57:24.972393462</dc:date>
    <meta:editing-duration>PT32S</meta:editing-duration>
    <meta:editing-cycles>1</meta:editing-cycles>
    <meta:document-statistic meta:table-count="1" meta:image-count="0" meta:object-count="0" meta:page-count="1" meta:paragraph-count="41" meta:word-count="379" meta:character-count="2596" meta:non-whitespace-character-count="2256"/>
    <meta:generator>LibreOffice/25.8.6.2$Linux_X86_64 LibreOffice_project/580$Build-2</meta:generator>
  </office:meta>
</office:document-meta>
</file>