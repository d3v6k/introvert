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antGarde LT Medium" svg:font-family="'AvantGarde LT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799in"/>
    </style:style>
    <style:style style:name="Table1.B" style:family="table-column">
      <style:table-column-properties style:column-width="1.6042in"/>
    </style:style>
    <style:style style:name="Table1.C" style:family="table-column">
      <style:table-column-properties style:column-width="4.74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text-properties style:font-name="AvantGarde LT Medium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3" style:family="paragraph" style:parent-style-name="Horizontal_20_Line">
      <style:text-properties style:font-name="AvantGarde LT Medium" fo:font-size="8pt" style:font-size-asian="8pt" style:font-size-complex="8pt"/>
    </style:style>
    <style:style style:name="P4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fo:font-weight="bold" style:font-size-asian="8pt" style:font-size-complex="8pt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fo:font-weight="bold" style:font-size-asian="8pt" style:font-size-complex="8pt"/>
    </style:style>
    <style:style style:name="P1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vantGarde LT Medium" fo:font-size="8pt" style:font-size-asian="8pt" style:font-size-complex="8pt"/>
    </style:style>
    <style:style style:name="P11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AvantGarde LT Medium" fo:font-size="8pt" style:font-size-asian="8pt" style:font-size-complex="8pt"/>
    </style:style>
    <style:style style:name="P12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Standard">
      <style:text-properties style:font-name="AvantGarde LT Medium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style:font-name="AvantGarde LT Medium" fo:font-size="8pt" fo:font-weight="bold" style:font-size-asian="8pt" style:font-size-complex="8pt"/>
    </style:style>
    <style:style style:name="T3" style:family="text">
      <style:text-properties style:font-name="AvantGarde LT Medium" fo:font-size="8pt" style:font-size-asian="8pt" style:font-size-complex="8pt"/>
    </style:style>
    <style:style style:name="T4" style:family="text">
      <style:text-properties style:font-family-asian="'Google Sans Text', sans-serif" style:font-family-complex="'Google Sans Text', sans-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pdated Project Brief: Introvert (Side-Loaded Mesh)</text:h>
      <text:p text:style-name="P2"><text:bookmark text:name="p-rc_6f0ea57dbb026336-633"/><text:span text:style-name="T1">Introvert</text:span> is a decentralized, privacy-first communication platform that utilizes a <text:span text:style-name="T1">Hybrid Mesh architecture</text:span> to overcome the background connectivity limitations of mobile operating systems. By bypassing centralized app stores, the project implements a direct <text:span text:style-name="T1">Solana-based token economy</text:span> that incentivizes users to provide infrastructure for the network. </text:p>
      <text:p text:style-name="P3"/>
      <text:h text:style-name="P4" text:outline-level="3">Core Project Aim</text:h>
      <text:p text:style-name="P2"><text:bookmark text:name="p-rc_6f0ea57dbb026336-634"/>The mission is to create a secure, serverless messaging and VoIP environment where availability is maintained by a mutualistic relationship between peers. Stable nodes (Anchors) provide zero-knowledge storage for mobile nodes (Ephemeral), and this service is powered by a native <text:span text:style-name="T1">Introvert Token</text:span> on the <text:span text:style-name="T1">Solana</text:span> blockchain. </text:p>
      <text:p text:style-name="P3"/>
      <text:h text:style-name="P4" text:outline-level="3">Technical Execution Strategy</text:h>
      <text:list text:style-name="L1">
        <text:list-item>
          <text:p text:style-name="P5">Platform &amp; Distribution:</text:p>
          <text:list>
            <text:list-item>
              <text:p text:style-name="P6"><text:bookmark text:name="p-rc_6f0ea57dbb026336-635"/><text:span text:style-name="T1">Side-Loading Strategy:</text:span> Bypassing Apple/Google stores via a <text:span text:style-name="T1">Capacitor-based</text:span> mobile app and direct Linux/Android distribution. </text:p>
            </text:list-item>
            <text:list-item>
              <text:p text:style-name="P6"><text:bookmark text:name="p-rc_6f0ea57dbb026336-636"/><text:span text:style-name="T1">Native Rust Core:</text:span> A high-performance engine linked to the UI via a <text:span text:style-name="T1">C-ABI/FFI bridge</text:span>. </text:p>
            </text:list-item>
          </text:list>
        </text:list-item>
        <text:list-item>
          <text:p text:style-name="P5">P2P Networking &amp; Identity:</text:p>
          <text:list>
            <text:list-item>
              <text:p text:style-name="P6"><text:bookmark text:name="p-rc_6f0ea57dbb026336-637"/><text:span text:style-name="T1">Persistent Identity:</text:span> Secure <text:span text:style-name="T1">Ed25519</text:span> keypairs that function as both a P2P node ID and a <text:span text:style-name="T1">Solana Wallet</text:span>. </text:p>
            </text:list-item>
            <text:list-item>
              <text:p text:style-name="P7"><text:bookmark text:name="p-rc_6f0ea57dbb026336-638"/><text:span text:style-name="T2">Advanced Transport:</text:span><text:span text:style-name="T3"> Utilizing </text:span><text:span text:style-name="Source_20_Text"><text:span text:style-name="T3">libp2p</text:span></text:span><text:span text:style-name="T3"> with </text:span><text:span text:style-name="T2">QUIC</text:span><text:span text:style-name="T3"> for roaming stability and </text:span><text:span text:style-name="T2">WebRTC</text:span><text:span text:style-name="T3"> for NAT hole-punching. </text:span></text:p>
            </text:list-item>
          </text:list>
        </text:list-item>
        <text:list-item>
          <text:p text:style-name="P5">Data &amp; Consistency:</text:p>
          <text:list>
            <text:list-item>
              <text:p text:style-name="P6"><text:bookmark text:name="p-rc_6f0ea57dbb026336-639"/><text:span text:style-name="T1">Local-First Storage:</text:span> <text:span text:style-name="T1">SQLCipher</text:span> encrypted databases with HKDF-derived keys. </text:p>
            </text:list-item>
            <text:list-item>
              <text:p text:style-name="P6"><text:bookmark text:name="p-rc_6f0ea57dbb026336-640"/><text:span text:style-name="T1">Conflict Resolution:</text:span> <text:span text:style-name="T1">CRDTs</text:span> for group management and <text:span text:style-name="T1">Lamport/Vector Clocks</text:span> for causal message ordering. </text:p>
            </text:list-item>
          </text:list>
        </text:list-item>
        <text:list-item>
          <text:p text:style-name="P5">Incentive Economy (Phase 6):</text:p>
          <text:list>
            <text:list-item>
              <text:p text:style-name="P6"><text:bookmark text:name="p-rc_6f0ea57dbb026336-641"/><text:span text:style-name="T1">Token Model:</text:span> A native SPL Token on Solana used to "meter" network usage and reward infrastructure providers. </text:p>
            </text:list-item>
            <text:list-item>
              <text:p text:style-name="P6"><text:bookmark text:name="p-rc_6f0ea57dbb026336-642"/><text:span text:style-name="T1">Proof of Storage:</text:span> Anchor nodes earn tokens by providing "Store and Forward" (mailbox) services for offline mobile peers. </text:p>
            </text:list-item>
          </text:list>
        </text:list-item>
      </text:list>
      <text:p text:style-name="P3"/>
      <text:h text:style-name="P4" text:outline-level="3">Phase-by-Phase Roadmap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<text:span text:style-name="Strong_20_Emphasis"><text:span text:style-name="T3">Phase</text:span></text:span></text:p>
            </table:table-cell>
            <table:table-cell table:style-name="Table1.A1" office:value-type="string">
              <text:p text:style-name="P8"><text:span text:style-name="Strong_20_Emphasis"><text:span text:style-name="T3">Milestone</text:span></text:span></text:p>
            </table:table-cell>
            <table:table-cell table:style-name="Table1.A1" office:value-type="string">
              <text:p text:style-name="P8"><text:span text:style-name="Strong_20_Emphasis"><text:span text:style-name="T3">Focu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Core Mesh</text:p>
          </table:table-cell>
          <table:table-cell table:style-name="Table1.A1" office:value-type="string">
            <text:p text:style-name="P10"><text:bookmark text:name="p-rc_6f0ea57dbb026336-643"/>Rust workspace, libp2p swarm, and Ed25519 persistence. <text:span text:style-name="T4"/></text:p>
          </table:table-cell>
        </table:table-row>
        <table:table-row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State Layer</text:p>
          </table:table-cell>
          <table:table-cell table:style-name="Table1.A1" office:value-type="string">
            <text:p text:style-name="P10"><text:bookmark text:name="p-rc_6f0ea57dbb026336-644"/>SQLCipher integration, CRDTs, and causal message ordering. <text:span text:style-name="T4"/></text:p>
          </table:table-cell>
        </table:table-row>
        <table:table-row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Anchor Service</text:p>
          </table:table-cell>
          <table:table-cell table:style-name="Table1.A1" office:value-type="string">
            <text:p text:style-name="P10"><text:bookmark text:name="p-rc_6f0ea57dbb026336-645"/>Uptime heuristics and zero-knowledge "Mailbox" protocols. <text:span text:style-name="T4"/></text:p>
          </table:table-cell>
        </table:table-row>
        <table:table-row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VoIP Bridge</text:p>
          </table:table-cell>
          <table:table-cell table:style-name="Table1.A1" office:value-type="string">
            <text:p text:style-name="P10"><text:bookmark text:name="p-rc_6f0ea57dbb026336-646"/>C-ABI interface and stateful <text:span text:style-name="T1">Opus</text:span> audio frame management. </text:p>
          </table:table-cell>
        </table:table-row>
        <table:table-row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Capacitor UI</text:p>
          </table:table-cell>
          <table:table-cell table:style-name="Table1.A1" office:value-type="string">
            <text:p text:style-name="P10"><text:bookmark text:name="p-rc_6f0ea57dbb026336-647"/>Side-loaded app with a "White Tech" glassmorphic aesthetic. <text:span text:style-name="T4"/></text:p>
          </table:table-cell>
        </table:table-row>
        <table:table-row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Solana Integration</text:p>
          </table:table-cell>
          <table:table-cell table:style-name="Table1.A1" office:value-type="string">
            <text:p text:style-name="P10"><text:bookmark text:name="p-rc_6f0ea57dbb026336-648"/>SPL Token minting, wallet derivation, and incentive logic. <text:span text:style-name="T4"/></text:p>
          </table:table-cell>
        </table:table-row>
      </table:table>
      <text:p text:style-name="P3"/>
      <text:h text:style-name="P4" text:outline-level="3"><text:soft-page-break/>Planned Technology Stack</text:h>
      <text:list text:style-name="L2">
        <text:list-item>
          <text:p text:style-name="P11"><text:bookmark text:name="p-rc_6f0ea57dbb026336-649"/><text:span text:style-name="T1">Systems:</text:span> Rust (Engine), TypeScript (Capacitor/UI). </text:p>
        </text:list-item>
        <text:list-item>
          <text:p text:style-name="P12"><text:bookmark text:name="p-rc_6f0ea57dbb026336-650"/><text:span text:style-name="T2">Networking:</text:span><text:span text:style-name="T3"> </text:span><text:span text:style-name="Source_20_Text"><text:span text:style-name="T3">libp2p</text:span></text:span><text:span text:style-name="T3"> (Kademlia DHT, QUIC, WebRTC). </text:span></text:p>
        </text:list-item>
        <text:list-item>
          <text:p text:style-name="P11"><text:bookmark text:name="p-rc_6f0ea57dbb026336-651"/><text:span text:style-name="T1">Cryptography:</text:span> Noise Protocol, Double Ratchet (Signal), Ed25519. </text:p>
        </text:list-item>
        <text:list-item>
          <text:p text:style-name="P12"><text:bookmark text:name="p-rc_6f0ea57dbb026336-652"/><text:span text:style-name="T2">Blockchain:</text:span><text:span text:style-name="T3"> Solana (SPL Token), </text:span><text:span text:style-name="Source_20_Text"><text:span text:style-name="T3">solana-sdk</text:span></text:span><text:span text:style-name="T3">. </text:span></text:p>
        </text:list-item>
        <text:list-item>
          <text:p text:style-name="P11"><text:bookmark text:name="p-rc_6f0ea57dbb026336-653"/><text:span text:style-name="T1">Storage:</text:span> SQLite/SQLCipher. </text:p>
        </text:list-item>
        <text:list-item>
          <text:p text:style-name="P11"><text:bookmark text:name="p-rc_6f0ea57dbb026336-654"/><text:span text:style-name="T1">Audio:</text:span> Opus Codec. 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antGarde LT Medium" svg:font-family="'AvantGarde LT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2:45:30.872946309</meta:creation-date>
    <dc:date>2026-04-30T22:46:02.844471501</dc:date>
    <meta:editing-duration>PT32S</meta:editing-duration>
    <meta:editing-cycles>1</meta:editing-cycles>
    <meta:document-statistic meta:table-count="1" meta:image-count="0" meta:object-count="0" meta:page-count="2" meta:paragraph-count="46" meta:word-count="348" meta:character-count="2455" meta:non-whitespace-character-count="2149"/>
    <meta:generator>LibreOffice/25.8.6.2$Linux_X86_64 LibreOffice_project/580$Build-2</meta:generator>
  </office:meta>
</office:document-meta>
</file>